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xygen-Sans" svg:font-family="Oxygen-San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Oxygen-Sans" fo:font-size="7pt" fo:language="en" fo:country="US" officeooo:rsid="001cf409" officeooo:paragraph-rsid="001cf409" style:font-size-asian="6.09999990463257pt" style:font-size-complex="7pt"/>
    </style:style>
    <style:style style:name="P2" style:family="paragraph" style:parent-style-name="Standard">
      <style:paragraph-properties fo:text-align="justify" style:justify-single-word="false"/>
      <style:text-properties style:font-name="Oxygen-Sans" fo:font-size="7pt" fo:language="en" fo:country="US" officeooo:rsid="001e561c" officeooo:paragraph-rsid="001e561c" style:font-size-asian="6.09999990463257pt" style:font-size-complex="7pt"/>
    </style:style>
    <style:style style:name="P3" style:family="paragraph" style:parent-style-name="Standard">
      <style:paragraph-properties fo:text-align="justify" style:justify-single-word="false"/>
      <style:text-properties style:font-name="Oxygen-Sans" fo:font-size="7pt" fo:language="en" fo:country="US" officeooo:rsid="00202d5b" officeooo:paragraph-rsid="00202d5b" style:font-size-asian="6.09999990463257pt" style:font-size-complex="7pt"/>
    </style:style>
    <style:style style:name="P4" style:family="paragraph" style:parent-style-name="Standard">
      <style:paragraph-properties fo:text-align="justify" style:justify-single-word="false"/>
      <style:text-properties style:font-name="Oxygen-Sans" fo:language="en" fo:country="US" officeooo:rsid="001cf409" officeooo:paragraph-rsid="001cf409"/>
    </style:style>
    <style:style style:name="P5" style:family="paragraph" style:parent-style-name="Standard">
      <style:paragraph-properties fo:text-align="justify" style:justify-single-word="false"/>
      <style:text-properties style:font-name="Oxygen-Sans" fo:language="en" fo:country="US" officeooo:rsid="001e561c" officeooo:paragraph-rsid="001e561c"/>
    </style:style>
    <style:style style:name="P6" style:family="paragraph" style:parent-style-name="Standard">
      <style:paragraph-properties fo:text-align="justify" style:justify-single-word="false"/>
      <style:text-properties style:font-name="Oxygen-Sans" fo:language="en" fo:country="US" officeooo:rsid="00202d5b" officeooo:paragraph-rsid="00202d5b"/>
    </style:style>
    <style:style style:name="P7" style:family="paragraph" style:parent-style-name="Standard">
      <style:paragraph-properties fo:text-align="justify" style:justify-single-word="false"/>
      <style:text-properties fo:color="#333333" style:font-name="Arial" fo:font-size="14pt" fo:language="en" fo:country="US" fo:font-weight="bold" officeooo:rsid="0022ffb7" officeooo:paragraph-rsid="0022ffb7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333333" style:font-name="Arial" fo:font-size="14pt" fo:language="en" fo:country="US" fo:font-style="normal" style:text-underline-style="none" fo:font-weight="normal" officeooo:rsid="0022ffb7" officeooo:paragraph-rsid="0022ffb7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333333" style:font-name="Arial" fo:font-size="14pt" fo:language="en" fo:country="US" fo:font-style="normal" style:text-underline-style="none" fo:font-weight="normal" officeooo:rsid="0022ffb7" officeooo:paragraph-rsid="0024a5d0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333333" style:font-name="Arial" fo:font-size="7pt" fo:language="en" fo:country="US" fo:font-weight="bold" officeooo:rsid="0022ffb7" officeooo:paragraph-rsid="0022ffb7" style:font-name-asian="Andale Sans UI" style:font-size-asian="6.0999999046325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333333" style:font-name="Courier 10 Pitch" fo:font-size="9pt" fo:language="en" fo:country="US" fo:font-style="normal" style:text-underline-style="none" fo:font-weight="normal" officeooo:rsid="0022ffb7" officeooo:paragraph-rsid="0022ffb7" style:font-name-asian="Andale Sans UI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language="en" fo:country="US" officeooo:rsid="0024a5d0" officeooo:paragraph-rsid="0024a5d0"/>
    </style:style>
    <style:style style:name="P13" style:family="paragraph" style:parent-style-name="Standard">
      <style:paragraph-properties fo:text-align="justify" style:justify-single-word="false"/>
      <style:text-properties style:font-name="Arial" fo:language="en" fo:country="US" officeooo:rsid="0026ca4d" officeooo:paragraph-rsid="0026ca4d"/>
    </style:style>
    <style:style style:name="P14" style:family="paragraph" style:parent-style-name="Standard">
      <style:paragraph-properties fo:text-align="justify" style:justify-single-word="false"/>
      <style:text-properties style:font-name="Arial" fo:language="en" fo:country="US" officeooo:rsid="00288e38" officeooo:paragraph-rsid="00288e38"/>
    </style:style>
    <style:style style:name="P15" style:family="paragraph" style:parent-style-name="Heading_20_1">
      <style:text-properties fo:color="#6666ff" fo:language="en" fo:country="US"/>
    </style:style>
    <style:style style:name="P16" style:family="paragraph" style:parent-style-name="Text_20_body">
      <style:text-properties style:font-name="Oxygen-Sans" fo:language="en" fo:country="US"/>
    </style:style>
    <style:style style:name="P17" style:family="paragraph" style:parent-style-name="Heading_20_2">
      <style:text-properties fo:color="#333333" fo:font-size="14pt" fo:language="en" fo:country="US" style:font-size-asian="14pt" style:font-size-complex="14pt"/>
    </style:style>
    <style:style style:name="P18" style:family="paragraph" style:parent-style-name="Header">
      <style:text-properties style:font-name="Oxygen-Sans" fo:language="en" fo:country="US" fo:font-weight="bold" officeooo:rsid="001cf409" officeooo:paragraph-rsid="001cf409" style:font-weight-asian="bold" style:font-weight-complex="bold"/>
    </style:style>
    <style:style style:name="T1" style:family="text">
      <style:text-properties officeooo:rsid="001d307f"/>
    </style:style>
    <style:style style:name="T2" style:family="text">
      <style:text-properties officeooo:rsid="001e561c"/>
    </style:style>
    <style:style style:name="T3" style:family="text">
      <style:text-properties fo:color="#333333" fo:font-size="14pt" fo:language="zxx" fo:country="none" fo:font-style="normal" style:text-underline-style="none" fo:font-weight="normal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T4" style:family="text">
      <style:text-properties fo:color="#333333" fo:font-size="14pt" fo:language="zxx" fo:country="none" fo:font-style="normal" style:text-underline-style="none" fo:font-weight="normal" officeooo:rsid="0026ca4d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T5" style:family="text">
      <style:text-properties fo:color="#333333" fo:font-size="14pt" fo:font-style="normal" style:text-underline-style="none" fo:font-weight="normal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T6" style:family="text">
      <style:text-properties fo:color="#333333" fo:font-size="14pt" fo:font-style="normal" style:text-underline-style="none" fo:font-weight="normal" officeooo:rsid="0026ca4d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T7" style:family="text">
      <style:text-properties fo:color="#333333" fo:font-size="14pt" fo:font-style="normal" style:text-underline-style="none" fo:font-weight="normal" officeooo:rsid="00288e38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T8" style:family="text">
      <style:text-properties style:font-name="Courier 10 Pitch" fo:font-size="9pt" style:font-size-asian="9pt" style:font-size-complex="9pt"/>
    </style:style>
    <style:style style:name="T9" style:family="text">
      <style:text-properties officeooo:rsid="0024a5d0"/>
    </style:style>
    <style:style style:name="T10" style:family="text">
      <style:text-properties officeooo:rsid="0026ca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Introduction :</text:h>
      <text:p text:style-name="P1"/>
      <text:p text:style-name="P4"><text:span text:style-name="T2">This</text:span> manual is intended to explain how to use the maze program and list the available configuration options presented for the user. </text:p>
      <text:p text:style-name="P1"/>
      <text:p text:style-name="P4">For further information, please <text:span text:style-name="T1">consult</text:span> the technical document<text:span text:style-name="T1">at</text:span>ion provided under the "doxygen" folder as a html documentation.</text:p>
      <text:p text:style-name="P1"/>
      <text:h text:style-name="P15" text:outline-level="1">Maze :</text:h>
      <text:p text:style-name="P1"/>
      <text:p text:style-name="P4">Welcome in the maze user guide. </text:p>
      <text:p text:style-name="P1"/>
      <text:h text:style-name="P17" text:outline-level="2">Purpose of the game :</text:h>
      <text:p text:style-name="P1"/>
      <text:p text:style-name="P4">In this game, you will have to get out of a randomly generated maze as qu<text:span text:style-name="T10">i</text:span>ck as possible by avoiding the enemies. </text:p>
      <text:p text:style-name="P1"/>
      <text:p text:style-name="P5">You begin with a given score, this score will decrease with the time. You can increase it by gathering bonus on your way, but beware of the malus.</text:p>
      <text:p text:style-name="P2"/>
      <text:p text:style-name="P6">As soon as you get out of the maze, you will have the possibility to save your score and your name for the <text:span text:style-name="T10">high-score</text:span> rank.</text:p>
      <text:p text:style-name="P3"/>
      <text:p text:style-name="P7">The grid :</text:p>
      <text:p text:style-name="P10"/>
      <text:p text:style-name="P16">A grid is <text:span text:style-name="T10">represented</text:span> like this :</text:p>
      <text:p text:style-name="P11">▓▓▓▓▓▓▓▓▓▓▓▓▓▓▓▓▓▓▓▓▓▓▓▓▓▓▓▓▓▓▓▓▓▓▓▓▓▓▓▓▓▓▓▓▓▓▓</text:p>
      <text:p text:style-name="P11"><text:s text:c="6"/>▓ <text:s text:c="2"/>▓ ▓ <text:s text:c="4"/>▓ <text:s text:c="8"/>▓ <text:s text:c="8"/>▓ <text:s text:c="4"/>▓ ▓</text:p>
      <text:p text:style-name="P11">▓▓▓▓▓ ▓ ▓▓▓ ▓▓▓▓▓ ▓ ▓▓▓▓▓▓▓▓▓▓▓▓▓▓▓ ▓▓▓▓▓▓▓ ▓ ▓</text:p>
      <text:p text:style-name="P11">▓ ▓ <text:s text:c="10"/>▓ <text:s text:c="8"/>▓ ▓ ▓ <text:s text:c="2"/>▓ <text:s text:c="4"/>▓ <text:s text:c="6"/>▓</text:p>
      <text:p text:style-name="P11">▓ ▓▓▓ ▓▓▓▓▓▓▓▓▓▓▓▓▓▓▓▓▓ ▓ ▓ ▓▓▓ ▓ ▓ ▓ ▓▓▓ ▓▓▓ ▓</text:p>
      <text:p text:style-name="P11">▓ ▓ <text:s text:c="2"/>▓ <text:s text:c="2"/>▓ ▓ <text:s text:c="12"/>▓ ▓ <text:s text:c="2"/>▓ ▓ ▓ ▓ <text:s text:c="2"/>▓ <text:s text:c="2"/>▓</text:p>
      <text:p text:style-name="P11">▓ ▓ ▓ ▓ ▓▓▓ ▓▓▓▓▓▓▓ ▓ ▓▓▓▓▓ ▓ ▓ ▓ ▓ ▓▓▓▓▓▓▓ ▓▓▓</text:p>
      <text:p text:style-name="P11">▓ <text:s text:c="2"/>▓ ▓ <text:s text:c="2"/>▓ <text:s text:c="2"/>▓ ▓ <text:s text:c="2"/>▓ <text:s text:c="2"/>▓ <text:s text:c="4"/>▓ <text:s text:c="2"/>▓ ▓ ▓ <text:s text:c="2"/>▓ <text:s text:c="2"/>▓</text:p>
      <text:p text:style-name="P11">▓ ▓▓▓▓▓▓▓ ▓▓▓ ▓ ▓ ▓ ▓▓▓▓▓▓▓ ▓▓▓▓▓▓▓▓▓ ▓ ▓▓▓ ▓▓▓</text:p>
      <text:p text:style-name="P11">▓ ▓ <text:s text:c="2"/>▓ ▓ <text:s text:c="8"/>▓ <text:s text:c="2"/>▓ <text:s text:c="2"/>▓ <text:s text:c="16"/>▓ ▓</text:p>
      <text:p text:style-name="P11">▓ ▓ ▓ ▓ ▓ ▓▓▓ ▓ ▓ ▓▓▓ ▓ ▓▓▓ ▓▓▓ ▓ ▓▓▓▓▓ ▓▓▓ ▓ ▓</text:p>
      <text:p text:style-name="P11">▓ <text:s text:c="2"/>▓ ▓ ▓ <text:s text:c="2"/>▓ ▓ ▓ ▓ ▓ ▓ <text:s text:c="6"/>▓ ▓ <text:s text:c="2"/>▓ <text:s text:c="2"/>▓ <text:s text:c="4"/>▓</text:p>
      <text:p text:style-name="P11">▓▓▓ ▓ ▓ ▓ ▓ ▓▓▓▓▓▓▓ ▓▓▓▓▓ ▓▓▓▓▓▓▓ ▓▓▓▓▓▓▓ ▓▓▓ ▓</text:p>
      <text:p text:style-name="P11">▓ <text:s text:c="2"/>▓ <text:s text:c="4"/>▓ <text:s text:c="2"/>▓ ▓ <text:s text:c="4"/>▓ ▓ ▓ <text:s text:c="4"/>▓ ▓ <text:s text:c="4"/>▓ ▓ <text:s text:c="2"/>▓</text:p>
      <text:p text:style-name="P11">▓▓▓ ▓▓▓▓▓ ▓ ▓▓▓ ▓ ▓▓▓ ▓ ▓ ▓▓▓ ▓ ▓ ▓ ▓▓▓ ▓ ▓▓▓▓▓</text:p>
      <text:p text:style-name="P11">▓ ▓ ▓ ▓ <text:s text:c="2"/>▓ <text:s text:c="6"/>▓ <text:s text:c="2"/>▓ <text:s text:c="2"/>▓ <text:s text:c="2"/>▓ <text:s text:c="6"/>▓ ▓ <text:s text:c="4"/>▓</text:p>
      <text:p text:style-name="P11">▓ ▓ ▓ ▓▓▓ ▓ ▓▓▓▓▓ ▓▓▓ ▓ ▓▓▓▓▓ ▓▓▓▓▓ ▓ ▓ ▓▓▓▓▓▓▓</text:p>
      <text:p text:style-name="P11">▓ <text:s text:c="4"/>▓ <text:s text:c="2"/>▓ <text:s text:c="2"/>▓ <text:s text:c="4"/>▓ <text:s text:c="4"/>▓ <text:s text:c="6"/>▓ ▓ ▓ <text:s text:c="7"/></text:p>
      <text:p text:style-name="P11">▓▓▓▓▓▓▓▓▓▓▓▓▓▓▓▓▓▓▓▓▓▓▓▓▓▓▓▓▓▓▓▓▓▓▓▓▓▓▓▓▓▓▓▓▓▓▓</text:p>
      <text:p text:style-name="P8"/>
      <text:p text:style-name="P9">You<text:span text:style-name="T9">r</text:span> player "o" can go anywhere there is no walls (represented by "<text:span text:style-name="T8">▓</text:span>").</text:p>
      <text:p text:style-name="P12"><text:span text:style-name="T5">To move your player, use the z, q, s and d key to respectively go up, down, left and right. </text:span><text:span text:style-name="T6">On some cells, you will find bonuses ("B") and maluses ("M").</text:span></text:p>
      <text:p text:style-name="P12"><text:span text:style-name="T6"/></text:p>
      <text:p text:style-name="P13"><text:soft-page-break/><text:span text:style-name="T5">You're not the only one in this maze, there is also enemies. </text:span><text:span text:style-name="T7">To get out, you will have to avoid them.</text:span></text:p>
      <text:p text:style-name="P13"><text:span text:style-name="T7"/></text:p>
      <text:p text:style-name="P14"><text:span text:style-name="T5">Launching the game :</text:span></text:p>
      <text:p text:style-name="P14"><text:span text:style-name="T5"/></text:p>
      <text:p text:style-name="P14"><text:span text:style-name="T5"/></text:p>
      <text:p text:style-name="P14"><text:span text:style-name="T5">Menu descritpion :</text:span></text:p>
      <text:p text:style-name="P14"><text:span text:style-name="T5"/></text:p>
      <text:p text:style-name="P14"><text:span text:style-name="T5"/></text:p>
      <text:p text:style-name="P14"><text:span text:style-name="T5">Generate the grid :</text:span></text:p>
      <text:p text:style-name="P14"><text:span text:style-name="T5"/></text:p>
      <text:p text:style-name="P14"><text:span text:style-name="T5"/></text:p>
      <text:p text:style-name="P14"><text:span text:style-name="T5">Save the grid :</text:span></text:p>
      <text:p text:style-name="P14"><text:span text:style-name="T5"/></text:p>
      <text:p text:style-name="P14"><text:span text:style-name="T5"/></text:p>
      <text:p text:style-name="P14"><text:span text:style-name="T5">Load the grid :</text:span></text:p>
      <text:p text:style-name="P14"><text:span text:style-name="T5"/></text:p>
      <text:p text:style-name="P14"><text:span text:style-name="T5"/></text:p>
      <text:p text:style-name="P14"><text:span text:style-name="T5">Play :</text:span></text:p>
      <text:p text:style-name="P14"><text:span text:style-name="T5"/></text:p>
      <text:p text:style-name="P14"><text:span text:style-name="T5"/></text:p>
      <text:p text:style-name="P14"><text:span text:style-name="T5">Exit :</text:span></text:p>
      <text:p text:style-name="P14"><text:span text:style-name="T5"/></text:p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xygen-Sans" svg:font-family="Oxygen-San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xygen-Sans" fo:language="en" fo:country="US" fo:font-weight="bold" officeooo:rsid="001cf409" officeooo:paragraph-rsid="001cf40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clerc Jérémie<text:tab/>Maze – User manual<text:tab/>01/11/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57S</meta:editing-duration>
    <meta:editing-cycles>12</meta:editing-cycles>
    <meta:generator>LibreOffice/5.0.2.2$Linux_X86_64 LibreOffice_project/00m0$Build-2</meta:generator>
    <dc:date>2015-11-01T11:59:18.124449256</dc:date>
    <meta:document-statistic meta:table-count="0" meta:image-count="0" meta:object-count="0" meta:page-count="2" meta:paragraph-count="41" meta:word-count="439" meta:character-count="2121" meta:non-whitespace-character-count="1491"/>
    <meta:user-defined meta:name="Info 1"/>
    <meta:user-defined meta:name="Info 2"/>
    <meta:user-defined meta:name="Info 3"/>
    <meta:user-defined meta:name="Info 4"/>
  </office:meta>
</office:document-meta>
</file>